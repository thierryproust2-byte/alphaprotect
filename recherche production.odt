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1.744cm" table:align="left"/>
    </style:style>
    <style:style style:name="Tableau1.A" style:family="table-column">
      <style:table-column-properties style:column-width="4.247cm"/>
    </style:style>
    <style:style style:name="Tableau1.B" style:family="table-column">
      <style:table-column-properties style:column-width="2.833cm"/>
    </style:style>
    <style:style style:name="Tableau1.C" style:family="table-column">
      <style:table-column-properties style:column-width="4.66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Quotations">
      <style:paragraph-properties fo:margin-left="1cm" fo:margin-right="1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text-indent="0cm" style:auto-text-indent="false"/>
    </style:style>
    <style:style style:name="P5" style:family="paragraph" style:parent-style-name="Text_20_body" style:list-style-name="L3">
      <style:paragraph-properties fo:margin-left="0cm" fo:margin-right="0cm" fo:text-indent="0cm" style:auto-text-indent="false"/>
    </style:style>
    <style:style style:name="P6" style:family="paragraph" style:parent-style-name="Text_20_body" style:list-style-name="L4">
      <style:paragraph-properties fo:margin-left="0cm" fo:margin-right="0cm" fo:text-indent="0cm" style:auto-text-indent="false"/>
    </style:style>
    <style:style style:name="P7" style:family="paragraph" style:parent-style-name="Text_20_body" style:list-style-name="L5">
      <style:paragraph-properties fo:margin-left="0cm" fo:margin-right="0cm" fo:text-indent="0cm" style:auto-text-indent="false"/>
    </style:style>
    <style:style style:name="P8" style:family="paragraph" style:parent-style-name="Text_20_body" style:list-style-name="L6">
      <style:paragraph-properties fo:margin-left="0cm" fo:margin-right="0cm" fo:text-indent="0cm" style:auto-text-indent="false"/>
    </style:style>
    <style:style style:name="P9" style:family="paragraph" style:parent-style-name="Text_20_body" style:list-style-name="L7">
      <style:paragraph-properties fo:margin-left="0cm" fo:margin-right="0cm" fo:text-indent="0cm" style:auto-text-indent="false"/>
    </style:style>
    <style:style style:name="P10" style:family="paragraph" style:parent-style-name="Text_20_body" style:list-style-name="L8">
      <style:paragraph-properties fo:margin-left="0cm" fo:margin-right="0cm" fo:text-indent="0cm" style:auto-text-indent="false"/>
    </style:style>
    <style:style style:name="P11" style:family="paragraph" style:parent-style-name="Text_20_body" style:list-style-name="L9">
      <style:paragraph-properties fo:margin-left="0cm" fo:margin-right="0cm" fo:text-indent="0cm" style:auto-text-indent="false"/>
    </style:style>
    <style:style style:name="P12" style:family="paragraph" style:parent-style-name="Text_20_body" style:list-style-name="L10">
      <style:paragraph-properties fo:margin-left="0cm" fo:margin-right="0cm" fo:text-indent="0cm" style:auto-text-indent="false"/>
    </style:style>
    <style:style style:name="P13" style:family="paragraph" style:parent-style-name="Text_20_body" style:list-style-name="L11">
      <style:paragraph-properties fo:margin-left="0cm" fo:margin-right="0cm" fo:text-indent="0cm" style:auto-text-indent="false"/>
    </style:style>
    <style:style style:name="P14" style:family="paragraph" style:parent-style-name="Text_20_body" style:list-style-name="L12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DdeLink__362_2550740098"/><text:bookmark-start text:name="__DdeLink__359_2550740098"/><text:span text:style-name="Strong_20_Emphasis">PROJET ALPHAPROTECT</text:span></text:h>
      <text:h text:style-name="Heading_20_3" text:outline-level="3"><text:span text:style-name="Emphasis">Document de présentation – Version professionnelle </text:span></text:h>
      <text:h text:style-name="Heading_20_2" text:outline-level="2"><text:span text:style-name="Strong_20_Emphasis">1. Schéma d’architecture</text:span></text:h>
      <text:h text:style-name="Heading_20_3" text:outline-level="3"><text:span text:style-name="Strong_20_Emphasis">1.1. Capteurs</text:span></text:h>
      <text:list text:style-name="L1">
        <text:list-item>
          <text:p text:style-name="P3">Capteurs PIR (détection de mouvement et chaleur)</text:p>
        </text:list-item>
        <text:list-item>
          <text:p text:style-name="P3">Caméra thermique (vision nocturne, signature thermique)</text:p>
        </text:list-item>
        <text:list-item>
          <text:p text:style-name="P3">Capteurs acoustiques (hurlements, grognements, cris)</text:p>
        </text:list-item>
        <text:list-item>
          <text:p text:style-name="P3">Capteurs olfactifs (optionnels – phéromones, odeurs animales)</text:p>
        </text:list-item>
      </text:list>
      <text:h text:style-name="Heading_20_3" text:outline-level="3"><text:span text:style-name="Strong_20_Emphasis">1.2. Microcontrôleur</text:span></text:h>
      <text:list text:style-name="L2">
        <text:list-item>
          <text:p text:style-name="P4">ESP32-S3 ou STM32L4</text:p>
        </text:list-item>
        <text:list-item>
          <text:p text:style-name="P4">Collecte des données</text:p>
        </text:list-item>
        <text:list-item>
          <text:p text:style-name="P4">Communication LoRa / BLE</text:p>
        </text:list-item>
        <text:list-item>
          <text:p text:style-name="P4">Très basse consommation</text:p>
        </text:list-item>
      </text:list>
      <text:h text:style-name="Heading_20_3" text:outline-level="3"><text:span text:style-name="Strong_20_Emphasis">1.3. Hub local</text:span></text:h>
      <text:list text:style-name="L3">
        <text:list-item>
          <text:p text:style-name="P5">Raspberry Pi 4 ou Jetson Nano</text:p>
        </text:list-item>
        <text:list-item>
          <text:p text:style-name="P5">Fusion multi-capteurs</text:p>
        </text:list-item>
        <text:list-item>
          <text:p text:style-name="P5">IA embarquée (TensorFlow Lite / PyTorch Mobile)</text:p>
        </text:list-item>
        <text:list-item>
          <text:p text:style-name="P5">Gestion des systèmes de dissuasion</text:p>
        </text:list-item>
      </text:list>
      <text:h text:style-name="Heading_20_3" text:outline-level="3"><text:span text:style-name="Strong_20_Emphasis">1.4. Cloud</text:span></text:h>
      <text:list text:style-name="L4">
        <text:list-item>
          <text:p text:style-name="P6">AWS IoT Core ou Azure IoT Hub</text:p>
        </text:list-item>
        <text:list-item>
          <text:p text:style-name="P6">Stockage des données</text:p>
        </text:list-item>
        <text:list-item>
          <text:p text:style-name="P6">API REST</text:p>
        </text:list-item>
        <text:list-item>
          <text:p text:style-name="P6">Analyse Big Data</text:p>
        </text:list-item>
        <text:list-item>
          <text:p text:style-name="P6">Notifications (SMS, push, e-mail)</text:p>
        </text:list-item>
      </text:list>
      <text:h text:style-name="Heading_20_3" text:outline-level="3"><text:span text:style-name="Strong_20_Emphasis">1.5. Application utilisateur</text:span></text:h>
      <text:list text:style-name="L5">
        <text:list-item>
          <text:p text:style-name="P7">Application mobile (iOS / Android)</text:p>
        </text:list-item>
        <text:list-item>
          <text:p text:style-name="P7">Dashboard temps réel</text:p>
        </text:list-item>
        <text:list-item>
          <text:p text:style-name="P7">Carte des alertes</text:p>
        </text:list-item>
        <text:list-item>
          <text:p text:style-name="P7">Historique</text:p>
        </text:list-item>
        <text:list-item>
          <text:p text:style-name="P7"><text:soft-page-break/>Interface web (React / Node.js ou Django)</text:p>
        </text:list-item>
      </text:list>
      <text:h text:style-name="Heading_20_2" text:outline-level="2"><text:span text:style-name="Strong_20_Emphasis">2. Définition du MVP (Minimum Viable Product)</text:span></text:h>
      <text:h text:style-name="Heading_20_3" text:outline-level="3"><text:span text:style-name="Strong_20_Emphasis">Objectif</text:span></text:h>
      <text:p text:style-name="P2">Créer une version fonctionnelle en <text:span text:style-name="Strong_20_Emphasis">6 à 10 semaines</text:span>, démontrant la valeur du système.</text:p>
      <text:h text:style-name="Heading_20_3" text:outline-level="3"><text:span text:style-name="Strong_20_Emphasis">Fonctionnalités incluses</text:span></text:h>
      <text:list text:style-name="L6">
        <text:list-item>
          <text:p text:style-name="P8">1 capteur PIR + 1 caméra thermique basique</text:p>
        </text:list-item>
        <text:list-item>
          <text:p text:style-name="P8">1 microcontrôleur ESP32</text:p>
        </text:list-item>
        <text:list-item>
          <text:p text:style-name="P8">1 hub Raspberry Pi</text:p>
        </text:list-item>
        <text:list-item>
          <text:p text:style-name="P8">Détection simple : <text:span text:style-name="Emphasis">présence suspecte / non suspecte</text:span></text:p>
        </text:list-item>
        <text:list-item>
          <text:p text:style-name="P8">Transmission LoRa ou WiFi</text:p>
        </text:list-item>
        <text:list-item>
          <text:p text:style-name="P8">Application mobile minimaliste :</text:p>
          <text:list>
            <text:list-item>
              <text:p text:style-name="P8">Notification d’alerte</text:p>
            </text:list-item>
            <text:list-item>
              <text:p text:style-name="P8">Carte</text:p>
            </text:list-item>
            <text:list-item>
              <text:p text:style-name="P8">Historique</text:p>
            </text:list-item>
          </text:list>
        </text:list-item>
        <text:list-item>
          <text:p text:style-name="P8">Cloud minimal :</text:p>
          <text:list>
            <text:list-item>
              <text:p text:style-name="P8">Stockage des alertes</text:p>
            </text:list-item>
            <text:list-item>
              <text:p text:style-name="P8">API REST</text:p>
            </text:list-item>
          </text:list>
        </text:list-item>
        <text:list-item>
          <text:p text:style-name="P8">Dissuasion simple : flash lumineux <text:span text:style-name="Strong_20_Emphasis">ou</text:span> son dissuasif</text:p>
        </text:list-item>
      </text:list>
      <text:h text:style-name="Heading_20_3" text:outline-level="3"><text:span text:style-name="Strong_20_Emphasis">Fonctionnalités exclues (phase 2)</text:span></text:h>
      <text:list text:style-name="L7">
        <text:list-item>
          <text:p text:style-name="P9">IA avancée (reconnaissance d’espèce)</text:p>
        </text:list-item>
        <text:list-item>
          <text:p text:style-name="P9">Drones autonomes</text:p>
        </text:list-item>
        <text:list-item>
          <text:p text:style-name="P9">Capteurs olfactifs</text:p>
        </text:list-item>
        <text:list-item>
          <text:p text:style-name="P9">Analyse comportementale</text:p>
        </text:list-item>
        <text:list-item>
          <text:p text:style-name="P9">Gestion multi-sites avancée</text:p>
        </text:list-item>
      </text:list>
      <text:h text:style-name="Heading_20_2" text:outline-level="2"><text:span text:style-name="Strong_20_Emphasis">3. Estimation des coût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Module</text:p>
            </table:table-cell>
            <table:table-cell table:style-name="Tableau1.A1" office:value-type="string">
              <text:p text:style-name="Table_20_Heading">Coût estimé</text:p>
            </table:table-cell>
            <table:table-cell table:style-name="Tableau1.A1" office:value-type="string">
              <text:p text:style-name="Table_20_Heading">Commentaire</text:p>
            </table:table-cell>
          </table:table-row>
        </table:table-header-rows>
        <table:table-row>
          <table:table-cell table:style-name="Tableau1.A1" office:value-type="string">
            <text:p text:style-name="Table_20_Contents">Capteur PIR</text:p>
          </table:table-cell>
          <table:table-cell table:style-name="Tableau1.A1" office:value-type="string">
            <text:p text:style-name="Table_20_Contents">5–12 €</text:p>
          </table:table-cell>
          <table:table-cell table:style-name="Tableau1.A1" office:value-type="string">
            <text:p text:style-name="Table_20_Contents">Très économique</text:p>
          </table:table-cell>
        </table:table-row>
        <table:table-row>
          <table:table-cell table:style-name="Tableau1.A1" office:value-type="string">
            <text:p text:style-name="Table_20_Contents">Caméra thermique</text:p>
          </table:table-cell>
          <table:table-cell table:style-name="Tableau1.A1" office:value-type="string">
            <text:p text:style-name="Table_20_Contents">150–300 €</text:p>
          </table:table-cell>
          <table:table-cell table:style-name="Tableau1.A1" office:value-type="string">
            <text:p text:style-name="Table_20_Contents">MLX90640 ou équivalent</text:p>
          </table:table-cell>
        </table:table-row>
        <table:table-row>
          <table:table-cell table:style-name="Tableau1.A1" office:value-type="string">
            <text:p text:style-name="Table_20_Contents">Microcontrôleur ESP32</text:p>
          </table:table-cell>
          <table:table-cell table:style-name="Tableau1.A1" office:value-type="string">
            <text:p text:style-name="Table_20_Contents">4–10 €</text:p>
          </table:table-cell>
          <table:table-cell table:style-name="Tableau1.A1" office:value-type="string">
            <text:p text:style-name="Table_20_Contents">Standard IoT</text:p>
          </table:table-cell>
        </table:table-row>
        <table:table-row>
          <table:table-cell table:style-name="Tableau1.A1" office:value-type="string">
            <text:p text:style-name="Table_20_Contents">Hub Raspberry Pi</text:p>
          </table:table-cell>
          <table:table-cell table:style-name="Tableau1.A1" office:value-type="string">
            <text:p text:style-name="Table_20_Contents">70–120 €</text:p>
          </table:table-cell>
          <table:table-cell table:style-name="Tableau1.A1" office:value-type="string">
            <text:p text:style-name="Table_20_Contents">Selon disponibilité</text:p>
          </table:table-cell>
        </table:table-row>
        <table:table-row>
          <table:table-cell table:style-name="Tableau1.A1" office:value-type="string">
            <text:p text:style-name="Table_20_Contents">Module LoRa</text:p>
          </table:table-cell>
          <table:table-cell table:style-name="Tableau1.A1" office:value-type="string">
            <text:p text:style-name="Table_20_Contents">10–25 €</text:p>
          </table:table-cell>
          <table:table-cell table:style-name="Tableau1.A1" office:value-type="string">
            <text:p text:style-name="Table_20_Contents">Longue portée</text:p>
          </table:table-cell>
        </table:table-row>
        <text:soft-page-break/>
        <table:table-row>
          <table:table-cell table:style-name="Tableau1.A1" office:value-type="string">
            <text:p text:style-name="Table_20_Contents">Batterie LiFePO4</text:p>
          </table:table-cell>
          <table:table-cell table:style-name="Tableau1.A1" office:value-type="string">
            <text:p text:style-name="Table_20_Contents">40–90 €</text:p>
          </table:table-cell>
          <table:table-cell table:style-name="Tableau1.A1" office:value-type="string">
            <text:p text:style-name="Table_20_Contents">Longue durée</text:p>
          </table:table-cell>
        </table:table-row>
        <table:table-row>
          <table:table-cell table:style-name="Tableau1.A1" office:value-type="string">
            <text:p text:style-name="Table_20_Contents">Panneau solaire</text:p>
          </table:table-cell>
          <table:table-cell table:style-name="Tableau1.A1" office:value-type="string">
            <text:p text:style-name="Table_20_Contents">30–80 €</text:p>
          </table:table-cell>
          <table:table-cell table:style-name="Tableau1.A1" office:value-type="string">
            <text:p text:style-name="Table_20_Contents">Petite puissance</text:p>
          </table:table-cell>
        </table:table-row>
        <table:table-row>
          <table:table-cell table:style-name="Tableau1.A1" office:value-type="string">
            <text:p text:style-name="Table_20_Contents">Boîtier IP65</text:p>
          </table:table-cell>
          <table:table-cell table:style-name="Tableau1.A1" office:value-type="string">
            <text:p text:style-name="Table_20_Contents">15–40 €</text:p>
          </table:table-cell>
          <table:table-cell table:style-name="Tableau1.A1" office:value-type="string">
            <text:p text:style-name="Table_20_Contents">Extérieur</text:p>
          </table:table-cell>
        </table:table-row>
        <table:table-row>
          <table:table-cell table:style-name="Tableau1.A1" office:value-type="string">
            <text:p text:style-name="Table_20_Contents">Développement MVP</text:p>
          </table:table-cell>
          <table:table-cell table:style-name="Tableau1.A1" office:value-type="string">
            <text:p text:style-name="Table_20_Contents">3 000–8 000 €</text:p>
          </table:table-cell>
          <table:table-cell table:style-name="Tableau1.A1" office:value-type="string">
            <text:p text:style-name="Table_20_Contents">Selon équipe</text:p>
          </table:table-cell>
        </table:table-row>
        <table:table-row>
          <table:table-cell table:style-name="Tableau1.A1" office:value-type="string">
            <text:p text:style-name="Table_20_Contents">Développement IA</text:p>
          </table:table-cell>
          <table:table-cell table:style-name="Tableau1.A1" office:value-type="string">
            <text:p text:style-name="Table_20_Contents">5 000–20 000 €</text:p>
          </table:table-cell>
          <table:table-cell table:style-name="Tableau1.A1" office:value-type="string">
            <text:p text:style-name="Table_20_Contents">Phase 2</text:p>
          </table:table-cell>
        </table:table-row>
      </table:table>
      <text:p text:style-name="P2"><text:span text:style-name="Strong_20_Emphasis">Coût total prototype : 400–700 €</text:span> <text:span text:style-name="Strong_20_Emphasis">Coût MVP logiciel : 3 000–8 000 €</text:span></text:p>
      <text:h text:style-name="Heading_20_2" text:outline-level="2"><text:span text:style-name="Strong_20_Emphasis">4. Profils des développeurs nécessaires</text:span></text:h>
      <text:h text:style-name="Heading_20_3" text:outline-level="3"><text:span text:style-name="Strong_20_Emphasis">Développeur embarqué (IoT)</text:span></text:h>
      <text:list text:style-name="L8">
        <text:list-item>
          <text:p text:style-name="P10">Compétences : C/C++, ESP32, FreeRTOS, LoRa</text:p>
        </text:list-item>
        <text:list-item>
          <text:p text:style-name="P10">Rôle : firmware, gestion capteurs</text:p>
        </text:list-item>
        <text:list-item>
          <text:p text:style-name="P10">Temps : 3–5 semaines</text:p>
        </text:list-item>
        <text:list-item>
          <text:p text:style-name="P10">Niveau : confirmé</text:p>
        </text:list-item>
      </text:list>
      <text:h text:style-name="Heading_20_3" text:outline-level="3"><text:span text:style-name="Strong_20_Emphasis">Développeur backend / cloud</text:span></text:h>
      <text:list text:style-name="L9">
        <text:list-item>
          <text:p text:style-name="P11">Compétences : Node.js / Python, API REST, MQTT, AWS/Azure</text:p>
        </text:list-item>
        <text:list-item>
          <text:p text:style-name="P11">Rôle : ingestion, stockage, notifications</text:p>
        </text:list-item>
        <text:list-item>
          <text:p text:style-name="P11">Temps : 2–4 semaines</text:p>
        </text:list-item>
        <text:list-item>
          <text:p text:style-name="P11">Niveau : intermédiaire à senior</text:p>
        </text:list-item>
      </text:list>
      <text:h text:style-name="Heading_20_3" text:outline-level="3"><text:span text:style-name="Strong_20_Emphasis">Développeur mobile</text:span></text:h>
      <text:list text:style-name="L10">
        <text:list-item>
          <text:p text:style-name="P12">Compétences : Flutter ou React Native</text:p>
        </text:list-item>
        <text:list-item>
          <text:p text:style-name="P12">Rôle : interface utilisateur</text:p>
        </text:list-item>
        <text:list-item>
          <text:p text:style-name="P12">Temps : 2–3 semaines</text:p>
        </text:list-item>
        <text:list-item>
          <text:p text:style-name="P12">Niveau : intermédiaire</text:p>
        </text:list-item>
      </text:list>
      <text:h text:style-name="Heading_20_3" text:outline-level="3"><text:span text:style-name="Strong_20_Emphasis">Ingénieur IA (phase 2)</text:span></text:h>
      <text:list text:style-name="L11">
        <text:list-item>
          <text:p text:style-name="P13">Compétences : vision thermique, TensorFlow Lite</text:p>
        </text:list-item>
        <text:list-item>
          <text:p text:style-name="P13">Rôle : reconnaissance d’espèces</text:p>
        </text:list-item>
        <text:list-item>
          <text:p text:style-name="P13">Temps : 4–8 semaines</text:p>
        </text:list-item>
        <text:list-item>
          <text:p text:style-name="P13">Niveau : senior</text:p>
        </text:list-item>
      </text:list>
      <text:h text:style-name="Heading_20_3" text:outline-level="3"><text:span text:style-name="Strong_20_Emphasis">Ingénieur électronique</text:span></text:h>
      <text:list text:style-name="L12">
        <text:list-item>
          <text:p text:style-name="P14">Compétences : alimentation solaire, PCB, BMS</text:p>
        </text:list-item>
        <text:list-item>
          <text:p text:style-name="P14">Rôle : fiabilisation du prototype</text:p>
        </text:list-item>
        <text:list-item>
          <text:p text:style-name="P14"><text:soft-page-break/>Temps : 1–2 semaines</text:p>
        </text:list-item>
        <text:list-item>
          <text:p text:style-name="P14">Niveau : confirmé</text:p>
        </text:list-item>
      </text:list>
      <text:h text:style-name="Heading_20_2" text:outline-level="2"><text:span text:style-name="Strong_20_Emphasis">5. Pitch professionnel</text:span></text:h>
      <text:p text:style-name="P1"><text:span text:style-name="Strong_20_Emphasis">AlphaProtect est un système intelligent de protection contre la prédation, conçu pour sécuriser les élevages et les territoires ruraux.</text:span> Grâce à une combinaison de capteurs, d’IA embarquée et d’un réseau longue portée, AlphaProtect détecte les prédateurs, analyse leur comportement et déclenche automatiquement des mesures de dissuasion adaptées.</text:p>
      <text:p text:style-name="P1">Le système fonctionne en autonomie, s’adapte aux environnements isolés et permet une protection collective à l’échelle d’un territoire.</text:p>
      <text:p text:style-name="P1"><text:span text:style-name="Strong_20_Emphasis">Objectif : réduire les attaques, diminuer le stress des éleveurs et proposer une solution moderne, collaborative et accessible.</text:span></text:p>
      <text:p text:style-name="P1">Le projet est <text:span text:style-name="Strong_20_Emphasis">ouvert, gratuit et d’intérêt général</text:span>. Nous recherchons des développeurs, ingénieurs, associations et collectivités souhaitant contribuer à une solution utile et immédiatement applicable.<text:bookmark-end text:name="__DdeLink__362_2550740098"/><text:bookmark-end text:name="__DdeLink__359_2550740098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9T13:23:23.082111261</meta:creation-date>
    <dc:date>2026-05-09T17:18:47.214669276</dc:date>
    <meta:editing-duration>PT53M18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4" meta:paragraph-count="119" meta:word-count="597" meta:character-count="3602" meta:non-whitespace-character-count="3198"/>
  </office:meta>
</office:document-meta>
</file>